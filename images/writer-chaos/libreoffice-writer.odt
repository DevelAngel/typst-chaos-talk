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FiraCode Nerd Font" svg:font-family="'FiraCode Nerd Font'" style:font-pitch="fixed"/>
    <style:font-face style:name="FiraCode Nerd Font Mono" svg:font-family="'FiraCode Nerd Font Mono'" style:font-pitch="fixed"/>
    <style:font-face style:name="FiraMono Nerd Font" svg:font-family="'FiraMon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nux Libertine"/>
    </style:style>
    <style:style style:name="P2" style:family="paragraph" style:parent-style-name="Standard" style:list-style-name="L1">
      <style:text-properties style:font-name="Linux Libertine" officeooo:rsid="0000842b" officeooo:paragraph-rsid="0000842b"/>
    </style:style>
    <style:style style:name="P3" style:family="paragraph" style:parent-style-name="Standard">
      <style:text-properties style:font-name="Linux Libertine" officeooo:rsid="0000842b" officeooo:paragraph-rsid="0000842b"/>
    </style:style>
    <style:style style:name="P4" style:family="paragraph" style:parent-style-name="Standard" style:list-style-name="L1">
      <style:text-properties style:font-name="Linux Libertine" officeooo:paragraph-rsid="0000842b"/>
    </style:style>
    <style:style style:name="P5" style:family="paragraph" style:parent-style-name="Standard">
      <style:text-properties style:font-name="Linux Libertine" fo:font-size="11pt" style:font-size-asian="11pt" style:font-size-complex="11pt"/>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text-properties style:font-name="FiraCode Nerd Font" officeooo:paragraph-rsid="0002fe05"/>
    </style:style>
    <style:style style:name="P8" style:family="paragraph" style:parent-style-name="Standard">
      <style:text-properties style:font-name="FiraMono Nerd Font" officeooo:paragraph-rsid="0002fe05"/>
    </style:style>
    <style:style style:name="P9" style:family="paragraph" style:parent-style-name="Standard">
      <style:text-properties style:font-name="FiraCode Nerd Font Mono"/>
    </style:style>
    <style:style style:name="T1" style:family="text">
      <style:text-properties style:font-name="Liberation Sans" fo:font-size="10.5pt" style:font-size-asian="10.5pt" style:font-size-complex="10.5pt"/>
    </style:style>
    <style:style style:name="T2" style:family="text">
      <style:text-properties officeooo:rsid="0002fe0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pan text:style-name="T1">Lorem ipsum dolor sit amet, consetetur sadipscing elitr, sed diam nonumy eirmod tempor invidunt ut labore et dolore magna aliquyam erat, sed diam voluptua.</text:span>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
      <text:list text:style-name="L1">
        <text:list-item>
          <text:p text:style-name="P2">Duis autem vel eum iriure dolor</text:p>
        </text:list-item>
        <text:list-item>
          <text:p text:style-name="P2"><text:s/>Ut wisi enim ad minim veniam</text:p>
        </text:list-item>
      </text:list>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
      <text:list text:continue-numbering="true" text:style-name="L1">
        <text:list-item>
          <text:p text:style-name="P4">Nam liber tempor cum soluta nobis eleifend option congue nihil imperdiet doming id quod mazim placerat facer possim assum. Lorem ipsum dolor sit amet</text:p>
        </text:list-item>
        <text:list-item>
          <text:p text:style-name="P2"><text:soft-page-break/>Lorem ipsum dolor sit amet, consetetur sadipscing elitr</text:p>
        </text:list-item>
      </text:list>
      <text:p text:style-name="P3"><text:s text:c="11"/>At vero eos et accusam et justo duo</text:p>
      <text:p text:style-name="P1"/>
      <text:p text:style-name="P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1"/>
      <text:p text:style-name="P6">Duis autem vel eum iriure dolor in hendrerit in vulputate velit esse molestie consequat, vel illum dolore eu feugiat nulla facilisis. </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1"/>
      <text:p text:style-name="P7">Consetetur sadipscing elitr, sed diam nonumy eirmod tempor invidunt ut labore et dolore magna aliquyam erat, sed diam voluptua. At vero eos et accusam et justo duo dolores et ea rebum. Stet clita kasd gubergren, no sea takimata sanctus est Lorem ipsum dolor sit amet. --&gt; <text:span text:style-name="T2">|-&gt;</text:span> !<text:span text:style-name="T2">=</text:span></text:p>
      <text:p text:style-name="P7"/>
      <text:p text:style-name="P8">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8">--&gt; <text:span text:style-name="T2">|→ !=</text:span></text:p>
      <text:p text:style-name="P9"/>
      <text:p text:style-name="P1">Lorem ipsum dolor sit amet, consetetur sadipscing elitr, sed diam nonumy eirmod tempor invidunt ut labore et dolore magna aliquyam erat, sed diam voluptua. At vero eos et accusam et <text:soft-page-break/>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FiraCode Nerd Font" svg:font-family="'FiraCode Nerd Font'" style:font-pitch="fixed"/>
    <style:font-face style:name="FiraCode Nerd Font Mono" svg:font-family="'FiraCode Nerd Font Mono'" style:font-pitch="fixed"/>
    <style:font-face style:name="FiraMono Nerd Font" svg:font-family="'FiraMon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5.8299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5T22:03:33.571910763</meta:creation-date>
    <dc:date>2026-03-15T23:58:24.862315172</dc:date>
    <meta:editing-duration>PT14M41S</meta:editing-duration>
    <meta:editing-cycles>1</meta:editing-cycles>
    <meta:document-statistic meta:table-count="0" meta:image-count="0" meta:object-count="0" meta:page-count="4" meta:paragraph-count="17" meta:word-count="936" meta:character-count="5665" meta:non-whitespace-character-count="4739"/>
    <meta:generator>LibreOffice/26.2.1.2$Linux_X86_64 LibreOffice_project/8399f6259d8c87f40e7255cdb3c9b958f5e08948</meta:generator>
  </office:meta>
</office:document-meta>
</file>